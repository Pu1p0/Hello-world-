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324cm" fo:min-width="29.432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Программирование" draw:style-name="dp1" draw:master-page-name="Title" presentation:presentation-page-layout-name="AL1T0">
        <draw:frame draw:name="Shape 77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Программирование</text:span></text:p>
          </draw:text-box>
        </draw:frame>
        <draw:frame draw:name="Shape 78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лину стороны квадрата. Вывести на экран пл" draw:style-name="dp1" draw:master-page-name="Title_20_and_20_Content" presentation:presentation-page-layout-name="AL2T11">
        <draw:frame draw:name="Shape 80" presentation:style-name="pr4" draw:text-style-name="P6" draw:layer="layout" svg:width="29.209cm" svg:height="5.096cm" svg:x="2.328cm" svg:y="1.014cm" presentation:class="title" presentation:user-transformed="true">
          <draw:text-box>
            <text:p text:style-name="P5"><text:span text:style-name="T2">Пользователь вводит длину стороны квадрата. Вывести на экран площадь квадрата.</text:span></text:p>
          </draw:text-box>
        </draw:frame>
        <draw:custom-shape draw:name="Shape 81" draw:style-name="gr2" draw:text-style-name="P8" draw:layer="layout" svg:width="24.617cm" svg:height="8.369cm" svg:x="3cm" svg:y="8.04cm">
          <text:p text:style-name="P7"><text:span text:style-name="T3"># Ввод длины стороны квадрата</text:span></text:p>
          <text:p text:style-name="P7"><text:span text:style-name="T3">side = float(input("Введите длину стороны квадрата: "))</text:span></text:p>
          <text:p text:style-name="P7"><text:span text:style-name="T3"/></text:p>
          <text:p text:style-name="P7"><text:span text:style-name="T3"># Вычисление площади</text:span></text:p>
          <text:p text:style-name="P7"><text:span text:style-name="T3">area = side * side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Площадь квадрата:", are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лины сторон прямоугольника. Вывести на экр" draw:style-name="dp1" draw:master-page-name="Title_20_and_20_Content" presentation:presentation-page-layout-name="AL2T11">
        <draw:frame draw:name="Shape 83" presentation:style-name="pr4" draw:text-style-name="P6" draw:layer="layout" svg:width="29.209cm" svg:height="7.524cm" svg:x="2.276cm" svg:y="0.472cm" presentation:class="title" presentation:user-transformed="true">
          <draw:text-box>
            <text:p text:style-name="P5"><text:span text:style-name="T2">Пользователь вводит длины сторон прямоугольника. Вывести на экран площадь прямоугольника.</text:span></text:p>
          </draw:text-box>
        </draw:frame>
        <draw:custom-shape draw:name="Shape 84" draw:style-name="gr3" draw:text-style-name="P8" draw:layer="layout" svg:width="9.999cm" svg:height="10.167cm" svg:x="3.001cm" svg:y="7.335cm">
          <text:p text:style-name="P7"><text:span text:style-name="T3"># Ввод длин сторон прямоугольника</text:span></text:p>
          <text:p text:style-name="P7"><text:span text:style-name="T3">a = float(input("Введите длину первой стороны: "))</text:span></text:p>
          <text:p text:style-name="P7"><text:span text:style-name="T3">b = float(input("Введите длину второй стороны: "))</text:span></text:p>
          <text:p text:style-name="P7"><text:span text:style-name="T3"/></text:p>
          <text:p text:style-name="P7"><text:span text:style-name="T3"># Вычисление площади</text:span></text:p>
          <text:p text:style-name="P7"><text:span text:style-name="T3">area = a * b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Площадь прямоугольника:", are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ва числа. Вывести на экран их среднее ариф" draw:style-name="dp1" draw:master-page-name="Title_20_and_20_Content" presentation:presentation-page-layout-name="AL2T11">
        <draw:frame draw:name="Shape 86" presentation:style-name="pr4" draw:text-style-name="P6" draw:layer="layout" svg:width="29.209cm" svg:height="5.882cm" svg:x="1.176cm" svg:y="1.355cm" presentation:class="title" presentation:user-transformed="true">
          <draw:text-box>
            <text:p text:style-name="P5"><text:span text:style-name="T2">Пользователь вводит два числа. Вывести на экран их среднее арифметическое.</text:span></text:p>
          </draw:text-box>
        </draw:frame>
        <draw:custom-shape draw:name="Shape 87" draw:style-name="gr4" draw:text-style-name="P8" draw:layer="layout" svg:width="9.999cm" svg:height="10.167cm" svg:x="2.5cm" svg:y="8.5cm">
          <text:p text:style-name="P7"><text:span text:style-name="T3"># Ввод двух чисел</text:span></text:p>
          <text:p text:style-name="P7"><text:span text:style-name="T3">num1 = float(input("Введите первое число: "))</text:span></text:p>
          <text:p text:style-name="P7"><text:span text:style-name="T3">num2 = float(input("Введите второе число: "))</text:span></text:p>
          <text:p text:style-name="P7"><text:span text:style-name="T3"/></text:p>
          <text:p text:style-name="P7"><text:span text:style-name="T3"># Вычисление среднего арифметического</text:span></text:p>
          <text:p text:style-name="P7"><text:span text:style-name="T3">average = (num1 + num2) / 2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Среднее арифметическое:", ave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ва числа. Вывести на экран их среднее геом" draw:style-name="dp1" draw:master-page-name="Title_20_and_20_Content" presentation:presentation-page-layout-name="AL2T11">
        <draw:frame draw:name="Shape 89" presentation:style-name="pr4" draw:text-style-name="P6" draw:layer="layout" svg:width="29.209cm" svg:height="5.227cm" svg:x="1.5cm" svg:y="1.773cm" presentation:class="title" presentation:user-transformed="true">
          <draw:text-box>
            <text:p text:style-name="P5"><text:span text:style-name="T2">Пользователь вводит два числа. Вывести на экран их среднее геометрическое.</text:span></text:p>
          </draw:text-box>
        </draw:frame>
        <draw:custom-shape draw:name="Shape 90" draw:style-name="gr5" draw:text-style-name="P8" draw:layer="layout" svg:width="9.999cm" svg:height="10.167cm" svg:x="2.5cm" svg:y="7cm">
          <text:p text:style-name="P7"><text:span text:style-name="T3"># Ввод двух чисел от пользователя</text:span></text:p>
          <text:p text:style-name="P7"><text:span text:style-name="T3">num1 = float(input("Введите первое число: "))</text:span></text:p>
          <text:p text:style-name="P7"><text:span text:style-name="T3">num2 = float(input("Введите второе число: "))</text:span></text:p>
          <text:p text:style-name="P7"><text:span text:style-name="T3"/></text:p>
          <text:p text:style-name="P7"><text:span text:style-name="T3"># Вычисление среднего арифметического</text:span></text:p>
          <text:p text:style-name="P7"><text:span text:style-name="T3">average = (num1 + num2) / 2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Среднее арифметическое:", ave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лины катетов прямоугольного треугольника. " draw:style-name="dp1" draw:master-page-name="Title_20_and_20_Content" presentation:presentation-page-layout-name="AL2T11">
        <draw:frame draw:name="Shape 92" presentation:style-name="pr4" draw:text-style-name="P6" draw:layer="layout" svg:width="29.209cm" svg:height="8.546cm" svg:x="9cm" svg:y="-6.5cm" presentation:class="title" presentation:user-transformed="true">
          <draw:text-box>
            <text:p text:style-name="P5"><text:span text:style-name="T2">Пользователь вводит длины катетов прямоугольного треугольника. Вывести на экран его гипотенузу и площадь.</text:span></text:p>
          </draw:text-box>
        </draw:frame>
        <draw:custom-shape draw:name="Shape 93" draw:style-name="gr6" draw:text-style-name="P8" draw:layer="layout" svg:width="9.999cm" svg:height="16.263cm" svg:x="9.001cm" svg:y="3cm">
          <text:p text:style-name="P7"><text:span text:style-name="T3">import math</text:span></text:p>
          <text:p text:style-name="P7"><text:span text:style-name="T3"/></text:p>
          <text:p text:style-name="P7"><text:span text:style-name="T3"># Ввод длин катетов</text:span></text:p>
          <text:p text:style-name="P7"><text:span text:style-name="T3">a = float(input("Введите длину первого катета: "))</text:span></text:p>
          <text:p text:style-name="P7"><text:span text:style-name="T3">b = float(input("Введите длину второго катета: "))</text:span></text:p>
          <text:p text:style-name="P7"><text:span text:style-name="T3"/></text:p>
          <text:p text:style-name="P7"><text:span text:style-name="T3"># Вычисление гипотенузы по теореме Пифагора: c = sqrt(a^2 + b^2)</text:span></text:p>
          <text:p text:style-name="P7"><text:span text:style-name="T3">hypotenuse = math.sqrt(a**2 + b**2)</text:span></text:p>
          <text:p text:style-name="P7"><text:span text:style-name="T3"/></text:p>
          <text:p text:style-name="P7"><text:span text:style-name="T3"># Вычисление площади: S = (a * b) / 2</text:span></text:p>
          <text:p text:style-name="P7"><text:span text:style-name="T3">area = (a * b) / 2</text:span></text:p>
          <text:p text:style-name="P7"><text:span text:style-name="T3"/></text:p>
          <text:p text:style-name="P7"><text:span text:style-name="T3"># Вывод результатов</text:span></text:p>
          <text:p text:style-name="P7"><text:span text:style-name="T3">print(f"Гипотенуза: {hypotenuse}")</text:span></text:p>
          <text:p text:style-name="P7"><text:span text:style-name="T3">print(f"Площадь: {area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число N. Вывести на экран через запятую (N-" draw:style-name="dp1" draw:master-page-name="Title_20_and_20_Content" presentation:presentation-page-layout-name="AL2T11">
        <draw:frame draw:name="Shape 95" presentation:style-name="pr4" draw:text-style-name="P6" draw:layer="layout" svg:width="29.209cm" svg:height="6.929cm" svg:x="2.328cm" svg:y="1.014cm" presentation:class="title" presentation:user-transformed="true">
          <draw:text-box>
            <text:p text:style-name="P5"><text:span text:style-name="T2">Пользователь вводит число N. Вывести на экран через запятую (N-1)</text:span><text:span text:style-name="T4">2</text:span><text:span text:style-name="T2">, N</text:span><text:span text:style-name="T4">2</text:span><text:span text:style-name="T2">, (N+1)</text:span><text:span text:style-name="T4">2</text:span></text:p>
          </draw:text-box>
        </draw:frame>
        <draw:custom-shape draw:name="Shape 96" draw:style-name="gr7" draw:text-style-name="P8" draw:layer="layout" svg:width="9.999cm" svg:height="7.881cm" svg:x="2.45cm" svg:y="9.716cm">
          <text:p text:style-name="P7"><text:span text:style-name="T3"># Ввод числа N</text:span></text:p>
          <text:p text:style-name="P7"><text:span text:style-name="T3">n = int(input("Введите число N: "))</text:span></text:p>
          <text:p text:style-name="P7"><text:span text:style-name="T3"/></text:p>
          <text:p text:style-name="P7"><text:span text:style-name="T3"># Вычисление квадратов</text:span></text:p>
          <text:p text:style-name="P7"><text:span text:style-name="T3">val1 = (n - 1) ** 2</text:span></text:p>
          <text:p text:style-name="P7"><text:span text:style-name="T3">val2 = n ** 2</text:span></text:p>
          <text:p text:style-name="P7"><text:span text:style-name="T3">val3 = (n + 1) ** 2</text:span></text:p>
          <text:p text:style-name="P7"><text:span text:style-name="T3"/></text:p>
          <text:p text:style-name="P7"><text:span text:style-name="T3"># Вывод через запятую</text:span></text:p>
          <text:p text:style-name="P7"><text:span text:style-name="T3">print(f"{val1}, {val2}, {val3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год. Вывести на экран ответ, является ли го" draw:style-name="dp1" draw:master-page-name="Title_20_and_20_Content" presentation:presentation-page-layout-name="AL2T11">
        <draw:frame draw:name="Shape 98" presentation:style-name="pr4" draw:text-style-name="P6" draw:layer="layout" svg:width="29.209cm" svg:height="6.458cm" svg:x="2.328cm" svg:y="0.7cm" presentation:class="title" presentation:user-transformed="true">
          <draw:text-box>
            <text:p text:style-name="P5"><text:span text:style-name="T2">Пользователь вводит год. Вывести на экран ответ, является ли год високосным.</text:span></text:p>
          </draw:text-box>
        </draw:frame>
        <draw:custom-shape draw:name="Shape 99" draw:style-name="gr8" draw:text-style-name="P8" draw:layer="layout" svg:width="9.999cm" svg:height="7.119cm" svg:x="4.501cm" svg:y="9.383cm">
          <text:p text:style-name="P7"><text:span text:style-name="T3"># Ввод года</text:span></text:p>
          <text:p text:style-name="P7"><text:span text:style-name="T3">year = int(input("Введите год: "))</text:span></text:p>
          <text:p text:style-name="P7"><text:span text:style-name="T3"/></text:p>
          <text:p text:style-name="P7"><text:span text:style-name="T3"># Проверка на високосный год</text:span></text:p>
          <text:p text:style-name="P7"><text:span text:style-name="T3">if (year % 4 == 0 and year % 100 != 0) or (year % 400 == 0):</text:span></text:p>
          <text:p text:style-name="P7"><text:span text:style-name="T3"><text:s text:c="4"/></text:span><text:span text:style-name="T3">print("Год високосный")</text:span></text:p>
          <text:p text:style-name="P7"><text:span text:style-name="T3">else:</text:span></text:p>
          <text:p text:style-name="P7"><text:span text:style-name="T3"><text:s text:c="4"/></text:span><text:span text:style-name="T3">print("Год не високосный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целое число. Программа должна ответить, чет" draw:style-name="dp1" draw:master-page-name="Title_20_and_20_Content" presentation:presentation-page-layout-name="AL2T11">
        <draw:frame draw:name="Shape 101" presentation:style-name="pr4" draw:text-style-name="P6" draw:layer="layout" svg:width="29.209cm" svg:height="7.158cm" svg:x="1.333cm" svg:y="0.864cm" presentation:class="title" presentation:user-transformed="true">
          <draw:text-box>
            <text:p text:style-name="P5"><text:span text:style-name="T2">Пользователь вводит целое число. Программа должна ответить, четным или нечетным является это число.</text:span></text:p>
          </draw:text-box>
        </draw:frame>
        <draw:custom-shape draw:name="Shape 102" draw:style-name="gr9" draw:text-style-name="P8" draw:layer="layout" svg:width="9.999cm" svg:height="8.643cm" svg:x="1.586cm" svg:y="9.035cm">
          <text:p text:style-name="P7"><text:span text:style-name="T3"># Ввод целого числа</text:span></text:p>
          <text:p text:style-name="P7"><text:span text:style-name="T3">number = int(input("Введите целое число: "))</text:span></text:p>
          <text:p text:style-name="P7"><text:span text:style-name="T3"/></text:p>
          <text:p text:style-name="P7"><text:span text:style-name="T3"># Проверка на четность с помощью оператора остатка от деления (%)</text:span></text:p>
          <text:p text:style-name="P7"><text:span text:style-name="T3">if number % 2 == 0:</text:span></text:p>
          <text:p text:style-name="P7"><text:span text:style-name="T3"><text:s text:c="4"/></text:span><text:span text:style-name="T3">print("Число четное")</text:span></text:p>
          <text:p text:style-name="P7"><text:span text:style-name="T3">else:</text:span></text:p>
          <text:p text:style-name="P7"><text:span text:style-name="T3"><text:s text:c="4"/></text:span><text:span text:style-name="T3">print("Число нечетное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ва числа. Если первое число меньше второго" draw:style-name="dp1" draw:master-page-name="Title_20_and_20_Content" presentation:presentation-page-layout-name="AL2T11">
        <draw:frame draw:name="Shape 104" presentation:style-name="pr4" draw:text-style-name="P6" draw:layer="layout" svg:width="29.209cm" svg:height="8.101cm" svg:x="3.791cm" svg:y="-5.101cm" presentation:class="title" presentation:user-transformed="true">
          <draw:text-box>
            <text:p text:style-name="P5"><text:span text:style-name="T2">Пользователь вводит два числа. Если первое число меньше второго, то вычислить их сумму, иначе – разность первого и второго.</text:span></text:p>
          </draw:text-box>
        </draw:frame>
        <draw:custom-shape draw:name="Shape 105" draw:style-name="gr10" draw:text-style-name="P8" draw:layer="layout" svg:width="9.999cm" svg:height="15.501cm" svg:x="13.001cm" svg:y="3cm">
          <text:p text:style-name="P7"><text:span text:style-name="T3"># Ввод двух чисел</text:span></text:p>
          <text:p text:style-name="P7"><text:span text:style-name="T3">num1 = float(input("Введите первое число: "))</text:span></text:p>
          <text:p text:style-name="P7"><text:span text:style-name="T3">num2 = float(input("Введите второе число: "))</text:span></text:p>
          <text:p text:style-name="P7"><text:span text:style-name="T3"/></text:p>
          <text:p text:style-name="P7"><text:span text:style-name="T3"># Проверка условия</text:span></text:p>
          <text:p text:style-name="P7"><text:span text:style-name="T3">if num1 &lt; num2:</text:span></text:p>
          <text:p text:style-name="P7"><text:span text:style-name="T3"><text:s text:c="4"/></text:span><text:span text:style-name="T3"># Если первое меньше второго, вычисляем сумму</text:span></text:p>
          <text:p text:style-name="P7"><text:span text:style-name="T3"><text:s text:c="4"/></text:span><text:span text:style-name="T3">result = num1 + num2</text:span></text:p>
          <text:p text:style-name="P7"><text:span text:style-name="T3"><text:s text:c="4"/></text:span><text:span text:style-name="T3">print(f"Первое число меньше второго. Сумма: {result}")</text:span></text:p>
          <text:p text:style-name="P7"><text:span text:style-name="T3">else:</text:span></text:p>
          <text:p text:style-name="P7"><text:span text:style-name="T3"><text:s text:c="4"/></text:span><text:span text:style-name="T3"># Иначе (если первое больше или равно второму) вычисляем разность</text:span></text:p>
          <text:p text:style-name="P7"><text:span text:style-name="T3"><text:s text:c="4"/></text:span><text:span text:style-name="T3">result = num1 - num2</text:span></text:p>
          <text:p text:style-name="P7"><text:span text:style-name="T3"><text:s text:c="4"/></text:span><text:span text:style-name="T3">print(f"Первое число не меньше второго. Разность: {result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спечатать первые 16 степеней числа 2." draw:style-name="dp1" draw:master-page-name="Title_20_and_20_Content" presentation:presentation-page-layout-name="AL2T11">
        <draw:frame draw:name="Shape 107" presentation:style-name="pr4" draw:text-style-name="P6" draw:layer="layout" svg:width="29.209cm" svg:height="6.065cm" svg:x="2.328cm" svg:y="1.014cm" presentation:class="title" presentation:user-transformed="true">
          <draw:text-box>
            <text:p text:style-name="P5"><text:span text:style-name="T2">Распечатать первые 16 степеней числа 2.</text:span></text:p>
          </draw:text-box>
        </draw:frame>
        <draw:custom-shape draw:name="Shape 108" draw:style-name="gr11" draw:text-style-name="P8" draw:layer="layout" svg:width="9.999cm" svg:height="3.309cm" svg:x="2.555cm" svg:y="8.747cm">
          <text:p text:style-name="P7"><text:span text:style-name="T3">print("Первые 16 степеней числа 2:")</text:span></text:p>
          <text:p text:style-name="P7"><text:span text:style-name="T3">for i in range(16):</text:span></text:p>
          <text:p text:style-name="P7"><text:span text:style-name="T3"><text:s text:c="4"/></text:span><text:span text:style-name="T3">print(f"2^{i} = {2 ** i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10 целых чисел. Подсчитать, сколько среди н" draw:style-name="dp1" draw:master-page-name="Title_20_and_20_Content" presentation:presentation-page-layout-name="AL2T11">
        <draw:frame draw:name="Shape 110" presentation:style-name="pr4" draw:text-style-name="P6" draw:layer="layout" svg:width="29.209cm" svg:height="4.598cm" svg:x="2.328cm" svg:y="1.014cm" presentation:class="title" presentation:user-transformed="true">
          <draw:text-box>
            <text:p text:style-name="P5"><text:span text:style-name="T2">Пользователь вводит 10 целых чисел. Подсчитать, сколько среди них четных чисел.</text:span></text:p>
          </draw:text-box>
        </draw:frame>
        <draw:custom-shape draw:name="Shape 111" draw:style-name="gr12" draw:text-style-name="P8" draw:layer="layout" svg:width="10.893cm" svg:height="9.405cm" svg:x="6cm" svg:y="8.5cm">
          <text:p text:style-name="P7"><text:span text:style-name="T3">count_even = 0 <text:s/># Счетчик четных чисел</text:span></text:p>
          <text:p text:style-name="P7"><text:span text:style-name="T3"/></text:p>
          <text:p text:style-name="P7"><text:span text:style-name="T3">print("Введите 10 целых чисел:")</text:span></text:p>
          <text:p text:style-name="P7"><text:span text:style-name="T3"/></text:p>
          <text:p text:style-name="P7"><text:span text:style-name="T3">for i in range(10):</text:span></text:p>
          <text:p text:style-name="P7"><text:span text:style-name="T3"><text:s text:c="4"/></text:span><text:span text:style-name="T3">num = int(input(f"Число {i + 1}: "))</text:span></text:p>
          <text:p text:style-name="P7"><text:span text:style-name="T3"><text:s text:c="4"/></text:span><text:span text:style-name="T3">if num % 2 == 0:</text:span></text:p>
          <text:p text:style-name="P7"><text:span text:style-name="T3"><text:s text:c="8"/></text:span><text:span text:style-name="T3">count_even += 1</text:span></text:p>
          <text:p text:style-name="P7"><text:span text:style-name="T3"/></text:p>
          <text:p text:style-name="P7"><text:span text:style-name="T3">print(f"Количество четных чисел: {count_even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10 целых чисел. Подсчитать, сколько среди н (2)" draw:style-name="dp1" draw:master-page-name="Title_20_and_20_Content" presentation:presentation-page-layout-name="AL2T11">
        <draw:frame draw:name="Shape 113" presentation:style-name="pr4" draw:text-style-name="P6" draw:layer="layout" svg:width="29.209cm" svg:height="6.456cm" svg:x="1.333cm" svg:y="0.702cm" presentation:class="title" presentation:user-transformed="true">
          <draw:text-box>
            <text:p text:style-name="P5"><text:span text:style-name="T2">Пользователь вводит 10 целых чисел. Подсчитать, сколько среди них положительных, сколько отрицательных и сколько нулей.</text:span></text:p>
          </draw:text-box>
        </draw:frame>
        <draw:custom-shape draw:name="Shape 114" draw:style-name="gr13" draw:text-style-name="P8" draw:layer="layout" svg:width="9.999cm" svg:height="17.787cm" svg:x="2.11cm" svg:y="7.647cm">
          <text:p text:style-name="P7"><text:span text:style-name="T3"># Инициализация счетчиков</text:span></text:p>
          <text:p text:style-name="P7"><text:span text:style-name="T3">positive_count = 0</text:span></text:p>
          <text:p text:style-name="P7"><text:span text:style-name="T3">negative_count = 0</text:span></text:p>
          <text:p text:style-name="P7"><text:span text:style-name="T3">zero_count = 0</text:span></text:p>
          <text:p text:style-name="P7"><text:span text:style-name="T3"/></text:p>
          <text:p text:style-name="P7"><text:span text:style-name="T3">print("Введите 10 целых чисел:")</text:span></text:p>
          <text:p text:style-name="P7"><text:span text:style-name="T3"/></text:p>
          <text:p text:style-name="P7"><text:span text:style-name="T3">for i in range(10):</text:span></text:p>
          <text:p text:style-name="P7"><text:span text:style-name="T3"><text:s text:c="4"/></text:span><text:span text:style-name="T3">num = int(input(f"Число {i + 1}: "))</text:span></text:p>
          <text:p text:style-name="P7"><text:span text:style-name="T3"><text:s text:c="4"/></text:span></text:p>
          <text:p text:style-name="P7"><text:span text:style-name="T3"><text:s text:c="4"/></text:span><text:span text:style-name="T3">if num &gt; 0:</text:span></text:p>
          <text:p text:style-name="P7"><text:span text:style-name="T3"><text:s text:c="8"/></text:span><text:span text:style-name="T3">positive_count += 1</text:span></text:p>
          <text:p text:style-name="P7"><text:span text:style-name="T3"><text:s text:c="4"/></text:span><text:span text:style-name="T3">elif num &lt; 0:</text:span></text:p>
          <text:p text:style-name="P7"><text:span text:style-name="T3"><text:s text:c="8"/></text:span><text:span text:style-name="T3">negative_count += 1</text:span></text:p>
          <text:p text:style-name="P7"><text:span text:style-name="T3"><text:s text:c="4"/></text:span><text:span text:style-name="T3">else:</text:span></text:p>
          <text:p text:style-name="P7"><text:span text:style-name="T3"><text:s text:c="8"/></text:span><text:span text:style-name="T3">zero_count += 1</text:span></text:p>
          <text:p text:style-name="P7"><text:span text:style-name="T3"/></text:p>
          <text:p text:style-name="P7"><text:span text:style-name="T3"># Вывод результатов</text:span></text:p>
          <text:p text:style-name="P7"><text:span text:style-name="T3">print(f"Положительных чисел: {positive_count}")</text:span></text:p>
          <text:p text:style-name="P7"><text:span text:style-name="T3">print(f"Отрицательных чисел: {negative_count}")</text:span></text:p>
          <text:p text:style-name="P7"><text:span text:style-name="T3">print(f"Нулей: {zero_count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10 целых чисел. Найти разницу между наиболь" draw:style-name="dp1" draw:master-page-name="Title_20_and_20_Content" presentation:presentation-page-layout-name="AL2T11">
        <draw:frame draw:name="Shape 116" presentation:style-name="pr4" draw:text-style-name="P6" draw:layer="layout" svg:width="17.132cm" svg:height="6.982cm" svg:x="13.278cm" svg:y="2.167cm" presentation:class="title" presentation:user-transformed="true">
          <draw:text-box>
            <text:p text:style-name="P5"><text:span text:style-name="T2">Пользователь вводит 10 целых чисел. Найти разницу между наибольшим и наименьшим.</text:span></text:p>
          </draw:text-box>
        </draw:frame>
        <draw:custom-shape draw:name="Shape 117" draw:style-name="gr14" draw:text-style-name="P8" draw:layer="layout" svg:width="9.999cm" svg:height="26.931cm" svg:x="1.874cm" svg:y="2.381cm">
          <text:p text:style-name="P7"><text:span text:style-name="T3"># Инициализация переменных для хранения максимума и минимума</text:span></text:p>
          <text:p text:style-name="P7"><text:span text:style-name="T3"># Используем None, чтобы правильно обработать первое введенное число</text:span></text:p>
          <text:p text:style-name="P7"><text:span text:style-name="T3">max_num = None</text:span></text:p>
          <text:p text:style-name="P7"><text:span text:style-name="T3">min_num = None</text:span></text:p>
          <text:p text:style-name="P7"><text:span text:style-name="T3"/></text:p>
          <text:p text:style-name="P7"><text:span text:style-name="T3">print("Введите 10 целых чисел:")</text:span></text:p>
          <text:p text:style-name="P7"><text:span text:style-name="T3"/></text:p>
          <text:p text:style-name="P7"><text:span text:style-name="T3">for i in range(10):</text:span></text:p>
          <text:p text:style-name="P7"><text:span text:style-name="T3"><text:s text:c="4"/></text:span><text:span text:style-name="T3">num = int(input(f"Число {i + 1}: "))</text:span></text:p>
          <text:p text:style-name="P7"><text:span text:style-name="T3"><text:s text:c="4"/></text:span></text:p>
          <text:p text:style-name="P7"><text:span text:style-name="T3"><text:s text:c="4"/></text:span><text:span text:style-name="T3"># Для первого числа устанавливаем и максимум, и минимум равными ему</text:span></text:p>
          <text:p text:style-name="P7"><text:span text:style-name="T3"><text:s text:c="4"/></text:span><text:span text:style-name="T3">if max_num is None or num &gt; max_num:</text:span></text:p>
          <text:p text:style-name="P7"><text:span text:style-name="T3"><text:s text:c="8"/></text:span><text:span text:style-name="T3">max_num = num</text:span></text:p>
          <text:p text:style-name="P7"><text:span text:style-name="T3"><text:s text:c="8"/></text:span></text:p>
          <text:p text:style-name="P7"><text:span text:style-name="T3"><text:s text:c="4"/></text:span><text:span text:style-name="T3">if min_num is None or num &lt; min_num:</text:span></text:p>
          <text:p text:style-name="P7"><text:span text:style-name="T3"><text:s text:c="8"/></text:span><text:span text:style-name="T3">min_num = num</text:span></text:p>
          <text:p text:style-name="P7"><text:span text:style-name="T3"/></text:p>
          <text:p text:style-name="P7"><text:span text:style-name="T3"># Вычисление разницы</text:span></text:p>
          <text:p text:style-name="P7"><text:span text:style-name="T3">difference = max_num - min_num</text:span></text:p>
          <text:p text:style-name="P7"><text:span text:style-name="T3"/></text:p>
          <text:p text:style-name="P7"><text:span text:style-name="T3"># Вывод результатов</text:span></text:p>
          <text:p text:style-name="P7"><text:span text:style-name="T3">print(f"Наибольшее число: {max_num}")</text:span></text:p>
          <text:p text:style-name="P7"><text:span text:style-name="T3">print(f"Наименьшее число: {min_num}")</text:span></text:p>
          <text:p text:style-name="P7"><text:span text:style-name="T3">print(f"Разница между наибольшим и наименьшим: {difference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массив А из 10 целых чисел. Подсчитать коли" draw:style-name="dp1" draw:master-page-name="Title_20_and_20_Content" presentation:presentation-page-layout-name="AL2T11">
        <draw:frame draw:name="Shape 119" presentation:style-name="pr4" draw:text-style-name="P6" draw:layer="layout" svg:width="18.39cm" svg:height="7.158cm" svg:x="14.5cm" svg:y="10.5cm" presentation:class="title" presentation:user-transformed="true">
          <draw:text-box>
            <text:p text:style-name="P5"><text:span text:style-name="T2">Пользователь вводит массив А из 10 целых чисел. Подсчитать количество чисел, равных максимальному элементу массива.</text:span></text:p>
          </draw:text-box>
        </draw:frame>
        <draw:custom-shape draw:name="Shape 120" draw:style-name="gr15" draw:text-style-name="P8" draw:layer="layout" svg:width="9.999cm" svg:height="20.835cm" svg:x="1.691cm" svg:y="2.757cm">
          <text:p text:style-name="P7"><text:span text:style-name="T3"># Создаем пустой список для хранения чисел</text:span></text:p>
          <text:p text:style-name="P7"><text:span text:style-name="T3">A = []</text:span></text:p>
          <text:p text:style-name="P7"><text:span text:style-name="T3"/></text:p>
          <text:p text:style-name="P7"><text:span text:style-name="T3">print("Введите 10 целых чисел:")</text:span></text:p>
          <text:p text:style-name="P7"><text:span text:style-name="T3">for i in range(10):</text:span></text:p>
          <text:p text:style-name="P7"><text:span text:style-name="T3"><text:s text:c="4"/></text:span><text:span text:style-name="T3">num = int(input(f"Число {i + 1}: "))</text:span></text:p>
          <text:p text:style-name="P7"><text:span text:style-name="T3"><text:s text:c="4"/></text:span><text:span text:style-name="T3">A.append(num)</text:span></text:p>
          <text:p text:style-name="P7"><text:span text:style-name="T3"/></text:p>
          <text:p text:style-name="P7"><text:span text:style-name="T3"># Находим максимальный элемент в массиве</text:span></text:p>
          <text:p text:style-name="P7"><text:span text:style-name="T3">max_element = max(A)</text:span></text:p>
          <text:p text:style-name="P7"><text:span text:style-name="T3"/></text:p>
          <text:p text:style-name="P7"><text:span text:style-name="T3"># Подсчитываем количество элементов, равных максимальному</text:span></text:p>
          <text:p text:style-name="P7"><text:span text:style-name="T3">count_max = 0</text:span></text:p>
          <text:p text:style-name="P7"><text:span text:style-name="T3">for num in A:</text:span></text:p>
          <text:p text:style-name="P7"><text:span text:style-name="T3"><text:s text:c="4"/></text:span><text:span text:style-name="T3">if num == max_element:</text:span></text:p>
          <text:p text:style-name="P7"><text:span text:style-name="T3"><text:s text:c="8"/></text:span><text:span text:style-name="T3">count_max += 1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f"Массив: {A}")</text:span></text:p>
          <text:p text:style-name="P7"><text:span text:style-name="T3">print(f"Максимальный элемент: {max_element}")</text:span></text:p>
          <text:p text:style-name="P7"><text:span text:style-name="T3">print(f"Количество чисел, равных максимальному: {count_max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массив А из 10 целых чисел. Подсчитать разн" draw:style-name="dp1" draw:master-page-name="Title_20_and_20_Content" presentation:presentation-page-layout-name="AL2T11">
        <draw:frame draw:name="Shape 122" presentation:style-name="pr4" draw:text-style-name="P6" draw:layer="layout" svg:width="19.011cm" svg:height="4.362cm" svg:x="0.6cm" svg:y="7.17cm" presentation:class="title" presentation:user-transformed="true">
          <draw:text-box>
            <text:p text:style-name="P5"><text:span text:style-name="T2">Пользователь вводит массив А из 10 целых чисел. Подсчитать разницу между суммой всех элементов с четными индексами и суммой всех элементов с нечетными индексами.</text:span></text:p>
          </draw:text-box>
        </draw:frame>
        <draw:custom-shape draw:name="Shape 123" draw:style-name="gr16" draw:text-style-name="P8" draw:layer="layout" svg:width="9.999cm" svg:height="28.453cm" svg:x="21.416cm" svg:y="1.726cm">
          <text:p text:style-name="P7"><text:span text:style-name="T3"># Инициализация списка и переменных для сумм</text:span></text:p>
          <text:p text:style-name="P7"><text:span text:style-name="T3">A = []</text:span></text:p>
          <text:p text:style-name="P7"><text:span text:style-name="T3">sum_even_indices = 0 <text:s/># Сумма элементов с четными индексами (0, 2, 4...)</text:span></text:p>
          <text:p text:style-name="P7"><text:span text:style-name="T3">sum_odd_indices = 0 <text:s text:c="2"/># Сумма элементов с нечетными индексами (1, 3, 5...)</text:span></text:p>
          <text:p text:style-name="P7"><text:span text:style-name="T3"/></text:p>
          <text:p text:style-name="P7"><text:span text:style-name="T3">print("Введите 10 целых чисел:")</text:span></text:p>
          <text:p text:style-name="P7"><text:span text:style-name="T3"/></text:p>
          <text:p text:style-name="P7"><text:span text:style-name="T3">for i in range(10):</text:span></text:p>
          <text:p text:style-name="P7"><text:span text:style-name="T3"><text:s text:c="4"/></text:span><text:span text:style-name="T3">num = int(input(f"Элемент с индексом {i}: "))</text:span></text:p>
          <text:p text:style-name="P7"><text:span text:style-name="T3"><text:s text:c="4"/></text:span><text:span text:style-name="T3">A.append(num)</text:span></text:p>
          <text:p text:style-name="P7"><text:span text:style-name="T3"><text:s text:c="4"/></text:span></text:p>
          <text:p text:style-name="P7"><text:span text:style-name="T3"><text:s text:c="4"/></text:span><text:span text:style-name="T3"># Проверяем четность индекса</text:span></text:p>
          <text:p text:style-name="P7"><text:span text:style-name="T3"><text:s text:c="4"/></text:span><text:span text:style-name="T3">if i % 2 == 0:</text:span></text:p>
          <text:p text:style-name="P7"><text:span text:style-name="T3"><text:s text:c="8"/></text:span><text:span text:style-name="T3">sum_even_indices += num</text:span></text:p>
          <text:p text:style-name="P7"><text:span text:style-name="T3"><text:s text:c="4"/></text:span><text:span text:style-name="T3">else:</text:span></text:p>
          <text:p text:style-name="P7"><text:span text:style-name="T3"><text:s text:c="8"/></text:span><text:span text:style-name="T3">sum_odd_indices += num</text:span></text:p>
          <text:p text:style-name="P7"><text:span text:style-name="T3"/></text:p>
          <text:p text:style-name="P7"><text:span text:style-name="T3"># Вычисляем разницу</text:span></text:p>
          <text:p text:style-name="P7"><text:span text:style-name="T3">difference = sum_even_indices - sum_odd_indices</text:span></text:p>
          <text:p text:style-name="P7"><text:span text:style-name="T3"/></text:p>
          <text:p text:style-name="P7"><text:span text:style-name="T3"># Вывод результатов</text:span></text:p>
          <text:p text:style-name="P7"><text:span text:style-name="T3">print(f"Массив: {A}")</text:span></text:p>
          <text:p text:style-name="P7"><text:span text:style-name="T3">print(f"Сумма элементов с четными индексами: {sum_even_indices}")</text:span></text:p>
          <text:p text:style-name="P7"><text:span text:style-name="T3">print(f"Сумма элементов с нечетными индексами: {sum_odd_indices}")</text:span></text:p>
          <text:p text:style-name="P7"><text:span text:style-name="T3">print(f"Разница (четные индексы - нечетные индексы): {difference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считать количество арабских цифр в тексте, введенном пользов" draw:style-name="dp1" draw:master-page-name="Title_20_and_20_Content" presentation:presentation-page-layout-name="AL2T11">
        <draw:frame draw:name="Shape 125" presentation:style-name="pr4" draw:text-style-name="P6" draw:layer="layout" svg:width="29.209cm" svg:height="6.248cm" svg:x="2.25cm" svg:y="1.04cm" presentation:class="title" presentation:user-transformed="true">
          <draw:text-box>
            <text:p text:style-name="P5"><text:span text:style-name="T2">Подсчитать количество арабских цифр в тексте, введенном пользователем с клавиатуры.</text:span></text:p>
          </draw:text-box>
        </draw:frame>
        <draw:custom-shape draw:name="Shape 126" draw:style-name="gr17" draw:text-style-name="P8" draw:layer="layout" svg:width="9.999cm" svg:height="13.215cm" svg:x="2.66cm" svg:y="8.275cm">
          <text:p text:style-name="P7"><text:span text:style-name="T3"># Ввод текста от пользователя</text:span></text:p>
          <text:p text:style-name="P7"><text:span text:style-name="T3">text = input("Введите текст: ")</text:span></text:p>
          <text:p text:style-name="P7"><text:span text:style-name="T3"/></text:p>
          <text:p text:style-name="P7"><text:span text:style-name="T3"># Инициализация счетчика</text:span></text:p>
          <text:p text:style-name="P7"><text:span text:style-name="T3">count_digits = 0</text:span></text:p>
          <text:p text:style-name="P7"><text:span text:style-name="T3"/></text:p>
          <text:p text:style-name="P7"><text:span text:style-name="T3"># Проходим по каждому символу в тексте</text:span></text:p>
          <text:p text:style-name="P7"><text:span text:style-name="T3">for char in text:</text:span></text:p>
          <text:p text:style-name="P7"><text:span text:style-name="T3"><text:s text:c="4"/></text:span><text:span text:style-name="T3"># Проверка, является ли символ цифрой</text:span></text:p>
          <text:p text:style-name="P7"><text:span text:style-name="T3"><text:s text:c="4"/></text:span><text:span text:style-name="T3">if char.isdigit():</text:span></text:p>
          <text:p text:style-name="P7"><text:span text:style-name="T3"><text:s text:c="8"/></text:span><text:span text:style-name="T3">count_digits += 1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f"Количество арабских цифр в тексте: {count_digits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брать из строки, введенной пользователем все пробелы, и распеч" draw:style-name="dp1" draw:master-page-name="Title_20_and_20_Content" presentation:presentation-page-layout-name="AL2T11">
        <draw:frame draw:name="Shape 128" presentation:style-name="pr4" draw:text-style-name="P6" draw:layer="layout" svg:width="29.209cm" svg:height="6.144cm" svg:x="1.5cm" svg:y="1.356cm" presentation:class="title" presentation:user-transformed="true">
          <draw:text-box>
            <text:p text:style-name="P5"><text:span text:style-name="T2">Убрать из строки, введенной пользователем все пробелы, и распечатать ее.</text:span></text:p>
          </draw:text-box>
        </draw:frame>
        <draw:custom-shape draw:name="Shape 129" draw:style-name="gr18" draw:text-style-name="P8" draw:layer="layout" svg:width="9.999cm" svg:height="10.167cm" svg:x="2.634cm" svg:y="8.642cm">
          <text:p text:style-name="P7"><text:span text:style-name="T3"># Ввод строки от пользователя</text:span></text:p>
          <text:p text:style-name="P7"><text:span text:style-name="T3">text = input("Введите строку: ")</text:span></text:p>
          <text:p text:style-name="P7"><text:span text:style-name="T3"/></text:p>
          <text:p text:style-name="P7"><text:span text:style-name="T3"># Удаление всех пробелов</text:span></text:p>
          <text:p text:style-name="P7"><text:span text:style-name="T3"># Метод replace заменяет все вхождения первого аргумента на второй</text:span></text:p>
          <text:p text:style-name="P7"><text:span text:style-name="T3">text_without_spaces = text.replace(" ", "")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Строка без пробелов:", text_without_spac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спечатать первое слово из строки, введенной пользователем с к" draw:style-name="dp1" draw:master-page-name="Title_20_and_20_Content" presentation:presentation-page-layout-name="AL2T11">
        <draw:frame draw:name="Shape 131" presentation:style-name="pr4" draw:text-style-name="P6" draw:layer="layout" svg:width="29.209cm" svg:height="6.51cm" svg:x="1.464cm" svg:y="1.04cm" presentation:class="title" presentation:user-transformed="true">
          <draw:text-box>
            <text:p text:style-name="P5"><text:span text:style-name="T2">Распечатать первое слово из строки, введенной пользователем с клавиатуры.</text:span></text:p>
          </draw:text-box>
        </draw:frame>
        <draw:custom-shape draw:name="Shape 132" draw:style-name="gr19" draw:text-style-name="P8" draw:layer="layout" svg:width="9.999cm" svg:height="13.215cm" svg:x="1.848cm" svg:y="9.061cm">
          <text:p text:style-name="P7"><text:span text:style-name="T3"># Ввод строки от пользователя</text:span></text:p>
          <text:p text:style-name="P7"><text:span text:style-name="T3">text = input("Введите строку: ")</text:span></text:p>
          <text:p text:style-name="P7"><text:span text:style-name="T3"/></text:p>
          <text:p text:style-name="P7"><text:span text:style-name="T3"># Разбиваем строку на слова. </text:span></text:p>
          <text:p text:style-name="P7"><text:span text:style-name="T3"># split() без аргументов автоматически игнорирует несколько пробелов, табуляции и переводы строк</text:span></text:p>
          <text:p text:style-name="P7"><text:span text:style-name="T3">words = text.split()</text:span></text:p>
          <text:p text:style-name="P7"><text:span text:style-name="T3"/></text:p>
          <text:p text:style-name="P7"><text:span text:style-name="T3"># Проверяем, есть ли слова в строке (защита от пустого ввода)</text:span></text:p>
          <text:p text:style-name="P7"><text:span text:style-name="T3">if words:</text:span></text:p>
          <text:p text:style-name="P7"><text:span text:style-name="T3"><text:s text:c="4"/></text:span><text:span text:style-name="T3">print("Первое слово:", words[0])</text:span></text:p>
          <text:p text:style-name="P7"><text:span text:style-name="T3">else:</text:span></text:p>
          <text:p text:style-name="P7"><text:span text:style-name="T3"><text:s text:c="4"/></text:span><text:span text:style-name="T3">print("Вы не ввели ни одного слова.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с клавиатуры текст. Записать его в файл." draw:style-name="dp1" draw:master-page-name="Title_20_and_20_Content" presentation:presentation-page-layout-name="AL2T11">
        <draw:frame draw:name="Shape 134" presentation:style-name="pr4" draw:text-style-name="P6" draw:layer="layout" svg:width="29.209cm" svg:height="6.013cm" svg:x="1.595cm" svg:y="1.198cm" presentation:class="title" presentation:user-transformed="true">
          <draw:text-box>
            <text:p text:style-name="P5"><text:span text:style-name="T2">Пользователь вводит с клавиатуры текст. Записать его в файл.</text:span></text:p>
          </draw:text-box>
        </draw:frame>
        <draw:custom-shape draw:name="Shape 135" draw:style-name="gr20" draw:text-style-name="P8" draw:layer="layout" svg:width="9.999cm" svg:height="17.025cm" svg:x="1.795cm" svg:y="8.223cm">
          <text:p text:style-name="P7"><text:span text:style-name="T3"># Ввод текста от пользователя</text:span></text:p>
          <text:p text:style-name="P7"><text:span text:style-name="T3">text = input("Введите текст для записи в файл: ")</text:span></text:p>
          <text:p text:style-name="P7"><text:span text:style-name="T3"/></text:p>
          <text:p text:style-name="P7"><text:span text:style-name="T3"># Имя файла</text:span></text:p>
          <text:p text:style-name="P7"><text:span text:style-name="T3">filename = "output.txt"</text:span></text:p>
          <text:p text:style-name="P7"><text:span text:style-name="T3"/></text:p>
          <text:p text:style-name="P7"><text:span text:style-name="T3"># Запись текста в файл</text:span></text:p>
          <text:p text:style-name="P7"><text:span text:style-name="T3"># 'w' (write) означает режим записи. Если файла нет, он создастся.</text:span></text:p>
          <text:p text:style-name="P7"><text:span text:style-name="T3"># Если файл есть, его содержимое будет перезаписано.</text:span></text:p>
          <text:p text:style-name="P7"><text:span text:style-name="T3"># encoding='utf-8' нужен для корректной работы с русским языком</text:span></text:p>
          <text:p text:style-name="P7"><text:span text:style-name="T3">with open(filename, 'w', encoding='utf-8') as file:</text:span></text:p>
          <text:p text:style-name="P7"><text:span text:style-name="T3"><text:s text:c="4"/></text:span><text:span text:style-name="T3">file.write(text)</text:span></text:p>
          <text:p text:style-name="P7"><text:span text:style-name="T3"/></text:p>
          <text:p text:style-name="P7"><text:span text:style-name="T3">print(f"Текст успешно записан в файл '{filename}'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аписать программу для следующей игры человека с компьютером. Ч" draw:style-name="dp1" draw:master-page-name="Title_20_and_20_Content" presentation:presentation-page-layout-name="AL2T11">
        <draw:frame draw:name="Shape 137" presentation:style-name="pr4" draw:text-style-name="P6" draw:layer="layout" svg:width="17.781cm" svg:height="6.615cm" svg:x="15.219cm" svg:y="-8.5cm" presentation:class="title" presentation:user-transformed="true">
          <draw:text-box>
            <text:p text:style-name="P5"><text:span text:style-name="T5">Написать программу для следующей игры человека с компьютером. Человек загадывает некоторое число из диапазона [N,M], а компьютер должен отгадать это число за минимальное количество вопросов типа »да-нет» (Ваше число больше 25? Ваше число меньше 70? И т.д.)</text:span></text:p>
          </draw:text-box>
        </draw:frame>
        <draw:custom-shape draw:name="Shape 138" draw:style-name="gr21" draw:text-style-name="P8" draw:layer="layout" svg:width="24.905cm" svg:height="38.36cm" svg:x="0.486cm" svg:y="-9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9" draw:layer="layout" svg:width="29.932cm" svg:height="36.512cm" draw:transform="rotate (0.00436332312998582) translate (4.42cm 1.065cm)">
          <draw:text-box>
            <text:p>def get_yes_no(prompt: str) -&gt; bool:</text:p>
            <text:p><text:s text:c="4"/>"""Запрашивает ответ 'да'/'нет', принимая разные варианты ввода."""</text:p>
            <text:p><text:s text:c="4"/>while True:</text:p>
            <text:p><text:s text:c="8"/>ans = input(prompt).strip().lower()</text:p>
            <text:p><text:s text:c="8"/>if ans in ('да', 'y', 'yes', '1', 'д'):</text:p>
            <text:p><text:s text:c="12"/>return True</text:p>
            <text:p><text:s text:c="8"/>elif ans in ('нет', 'n', 'no', '0', 'н'):</text:p>
            <text:p><text:s text:c="12"/>return False</text:p>
            <text:p><text:s text:c="8"/>print("⚠️ Пожалуйста, введите 'да' или 'нет'.")</text:p>
            <text:p/>
            <text:p>def play_game():</text:p>
            <text:p><text:s text:c="4"/>print("🤖 Игра: Компьютер угадывает ваше число")</text:p>
            <text:p><text:s text:c="4"/>print("-" * 40)</text:p>
            <text:p><text:s text:c="4"/></text:p>
            <text:p><text:s text:c="4"/>try:</text:p>
            <text:p><text:s text:c="8"/>n = int(input("Введите нижнюю границу диапазона N: "))</text:p>
            <text:p><text:s text:c="8"/>m = int(input("Введите верхнюю границу диапазона M: "))</text:p>
            <text:p><text:s text:c="4"/>except ValueError:</text:p>
            <text:p><text:s text:c="8"/>print("❌ Ошибка: введите целые числа.")</text:p>
            <text:p><text:s text:c="8"/>return</text:p>
            <text:p/>
            <text:p><text:s text:c="4"/>if n &gt;= m:</text:p>
            <text:p><text:s text:c="8"/>print("❌ Ошибка: N должно быть строго меньше M.")</text:p>
            <text:p><text:s text:c="8"/>return</text:p>
            <text:p/>
            <text:p><text:s text:c="4"/>low, high = n, m</text:p>
            <text:p><text:s text:c="4"/>questions = 0</text:p>
            <text:p/>
            <text:p><text:s text:c="4"/>print(f"\n🔹 Загадайте число от {low} до {high}.")</text:p>
            <text:p><text:s text:c="4"/>print("🔹 Отвечайте честно. Можно использовать: да/y/1 или нет/n/0")</text:p>
            <text:p><text:s text:c="4"/>print("-" * 40)</text:p>
            <text:p/>
            <text:p><text:s text:c="4"/>while low &lt; high:</text:p>
            <text:p><text:s text:c="8"/>mid = (low + high) // 2</text:p>
            <text:p><text:s text:c="8"/>questions += 1</text:p>
            <text:p><text:s text:c="8"/></text:p>
            <text:p><text:s text:c="8"/>is_greater = get_yes_no(f"❓ Вопрос {questions}: Ваше число больше {mid}? (да/нет): ")</text:p>
            <text:p><text:s text:c="8"/></text:p>
            <text:p><text:s text:c="8"/>if is_greater:</text:p>
            <text:p><text:s text:c="12"/>low = mid + 1</text:p>
            <text:p><text:s text:c="8"/>else:</text:p>
            <text:p><text:s text:c="12"/>high = mid</text:p>
            <text:p/>
            <text:p><text:s text:c="4"/>print("\n" + "=" * 40)</text:p>
            <text:p><text:s text:c="4"/>print(f"✅ Я угадал! Ваше число: {low}")</text:p>
            <text:p><text:s text:c="4"/>print(f"📊 Использовано вопросов: {questions}")</text:p>
            <text:p><text:s text:c="4"/>print(f"📏 Теоретический минимум для этого диапазона: {len(bin(high - low)) - 2} (бинарный поиск)")</text:p>
            <text:p><text:s text:c="4"/>print("=" * 40)</text:p>
            <text:p/>
            <text:p>if __name__ == "__main__":</text:p>
            <text:p><text:s text:c="4"/>play_game()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90%" fo:text-align="star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/>
    </style:style>
    <style:style style:name="MP14" style:family="paragraph">
      <style:paragraph-properties fo:margin-left="0cm" fo:margin-right="0cm" fo:margin-top="0.176cm" fo:margin-bottom="0cm" fo:line-height="90%" fo:text-align="start" fo:text-indent="0cm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Shape 33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Shape 35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Shape 36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hape 37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Shape 49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Shape 50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51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Shape 52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hape 53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5T20:11:14</meta:creation-date>
    <dc:date>2026-05-18T13:38:22.920866766</dc:date>
    <meta:editing-duration>PT1H43M12S</meta:editing-duration>
    <meta:generator>LibreOffice/7.6.7.2$Linux_X86_64 LibreOffice_project/60$Build-2</meta:generator>
    <meta:editing-cycles>2</meta:editing-cycles>
    <meta:document-statistic meta:object-count="117"/>
    <meta:template xlink:type="simple" xlink:actuate="onRequest" xlink:title="Normal.dotm" xlink:href=""/>
  </office:meta>
</office:document-meta>
</file>